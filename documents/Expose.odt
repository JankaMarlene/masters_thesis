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fo:font-size="12pt" style:font-size-asian="12pt" style:font-size-complex="12pt"/>
    </style:style>
    <style:style style:name="P2" style:parent-style-name="Normal" style:family="paragraph">
      <style:paragraph-properties fo:text-align="start" fo:text-indent="0in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CommentText" style:family="paragraph">
      <style:paragraph-properties fo:text-align="start" fo:text-indent="0in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paragraph-properties fo:text-align="start" fo:text-indent="0in"/>
      <style:text-properties fo:language="en" fo:country="US"/>
    </style:style>
    <style:style style:name="P34" style:parent-style-name="Normal" style:family="paragraph">
      <style:paragraph-properties fo:text-align="start" fo:text-indent="0in"/>
    </style:style>
    <style:style style:name="T3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</text:span><text:span text:style-name="T5">onfirmed cases of coronavirus disease 2019 (COVID-19) have been documented<text:s/></text:span><text:span text:style-name="T6">by the World Health Organization (WHO)<text:s/></text:span><text:span text:style-name="T7">globally,<text:s/></text:span><text:span text:style-name="T8">leading to</text:span><text:span text:style-name="T9"><text:s/>appro</text:span><text:span text:style-name="T10">x</text:span><text:span text:style-name="T11">imately 6.9 million deaths. The actual numbers are likely to be</text:span><text:span text:style-name="T12"><text:s/>much</text:span><text:span text:style-name="T13"><text:s/>higher due to underreporting.</text:span><text:span text:style-name="T14"><text:s/>COVID-19 is an infectious disease caused by the SARS-CoV-2 virus.<text:s/></text:span><text:span text:style-name="T15">While m</text:span><text:span text:style-name="T16">ost patients fully recover</text:span><text:span text:style-name="T17"><office:annotation office:name="0" xml:id="2060837637"><dc:creator>Janka Hauffe</dc:creator><dc:date>2024-09-22T12:18:00</dc:date><meta:creator-initials>JH</meta:creator-initials><text:p text:style-name="P18">10-20% of people</text:p></office:annotation>, some<text:s/></text:span><text:span text:style-name="CommentReference"><office:annotation-end office:name="0"/></text:span><text:span text:style-name="T19">experience persistent<text:s/></text:span><text:span text:style-name="T20">sym</text:span><text:span text:style-name="T21">p</text:span><text:span text:style-name="T22">toms</text:span><text:span text:style-name="T23"><text:s/>such as</text:span><text:span text:style-name="T24"><text:s/></text:span><text:span text:style-name="T25">fatigue, shortness of breath, cognitive dysfunction, and other</text:span><text:span text:style-name="T26"><text:s/>symptoms that</text:span><text:span text:style-name="T27"><text:s/>generally have an impact on everyday functioning.<text:s/></text:span><text:span text:style-name="T28">These remaining effects, referred to as Post COVID-19 Condition or more commonly as long COVID, usually occur three months after the initial infection with the SARS-CoV-2 virus and last for at least two month with no other explanation.</text:span><text:span text:style-name="T29"><text:s/>Approximately 10-20% of people inf</text:span><text:span text:style-name="T30">e</text:span><text:span text:style-name="T31">cted with SARS-CoV-2 meet the criteria for long COVID (WHO).<text:s/></text:span><text:span text:style-name="T32"><text:s/></text:span></text:p>
      <text:p text:style-name="P33"/>
      <text:p text:style-name="P34"><text:span text:style-name="T35">Around 22% of individuals diagnosed of Post COVID-19 Condition experience COVID-related cognitive impairment, according to findings by Ceban et al. (2022)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2T10:39:00Z</dc:date>
    <meta:template xlink:href="Normal.dotm" xlink:type="simple"/>
    <meta:editing-cycles>6</meta:editing-cycles>
    <meta:editing-duration>PT0S</meta:editing-duration>
    <meta:document-statistic meta:page-count="1" meta:paragraph-count="2" meta:word-count="146" meta:character-count="1067" meta:row-count="7" meta:non-whitespace-character-count="923"/>
  </office:meta>
</office:document-meta>
</file>